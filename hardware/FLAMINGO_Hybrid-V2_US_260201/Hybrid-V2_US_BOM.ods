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FF" style:font-name="Roboto" style:font-name-asian="Roboto" style:font-name-complex="Roboto" style:text-underline-style="solid" style:text-underline-type="single"/>
    </style:style>
    <style:style style:name="ce4" style:family="table-cell" style:parent-style-name="Default" style:data-style-name="N0">
      <style:table-cell-properties style:vertical-align="middle"/>
      <style:text-properties fo:color="#000000"/>
    </style:style>
    <style:style style:name="ce5" style:family="table-cell" style:parent-style-name="Default" style:data-style-name="N36">
      <style:table-cell-properties style:vertical-align="middle"/>
      <style:text-properties fo:color="#000000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36">
      <style:text-properties fo:color="#000000"/>
    </style:style>
    <style:style style:name="ce9" style:family="table-cell" style:parent-style-name="Default" style:data-style-name="N0">
      <style:table-cell-properties style:vertical-align="middle"/>
      <style:text-properties fo:color="#0000FF" style:font-name="Roboto" style:font-name-asian="Roboto" style:font-name-complex="Roboto" style:text-underline-style="solid" style:text-underline-type="single"/>
    </style:style>
    <style:style style:name="ce10" style:family="table-cell" style:parent-style-name="Default" style:data-style-name="N0">
      <style:table-cell-properties style:vertical-align="middle"/>
      <style:text-properties fo:color="#434343" style:font-name="Roboto" style:font-name-asian="Roboto" style:font-name-complex="Roboto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color="#000000"/>
    </style:style>
    <style:style style:name="ce12" style:family="table-cell" style:parent-style-name="Hyperlink" style:data-style-name="N0">
      <style:table-cell-properties style:vertical-align="middle"/>
      <style:text-properties fo:color="#1155CC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middle"/>
      <style:text-properties fo:color="#000000" style:font-family-generic="swiss"/>
    </style:style>
    <style:style style:name="ce15" style:family="table-cell" style:parent-style-name="Default" style:data-style-name="N36">
      <style:text-properties fo:color="#000000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137708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5.13291666666667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table:tab-color="#FF9900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AND(ISNUMBER([.H2]);(NOT(OR(NOT(ISERROR(DATEVALUE([.H2]))); AND(ISNUMBER([.H2]); LEFT(CELL(&quot;format&quot;; [.H2]))=&quot;D&quot;))))))" table:base-cell-address="Hybrid_V2_BOM.H2" table:display-list="none">
          <table:help-message/>
          <table:error-message/>
        </table:content-validation>
      </table:content-validations>
      <table:table table:name="Hybrid_V2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3">
            <text:p>Line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Specifications</text:p>
          </table:table-cell>
          <table:table-cell office:value-type="string" table:style-name="ce13">
            <text:p>Manufacturer</text:p>
          </table:table-cell>
          <table:table-cell office:value-type="string" table:style-name="ce13">
            <text:p>P/N</text:p>
          </table:table-cell>
          <table:table-cell office:value-type="string" table:style-name="ce13">
            <text:p>Supplier</text:p>
          </table:table-cell>
          <table:table-cell office:value-type="string" table:style-name="ce13">
            <text:p>SKU</text:p>
          </table:table-cell>
          <table:table-cell office:value-type="string" table:style-name="ce13">
            <text:p>Unit Cost</text:p>
          </table:table-cell>
          <table:table-cell office:value-type="string" table:style-name="ce13">
            <text:p>Qty</text:p>
          </table:table-cell>
          <table:table-cell office:value-type="string" table:style-name="ce13">
            <text:p>Unit</text:p>
          </table:table-cell>
          <table:table-cell office:value-type="string" table:style-name="ce13">
            <text:p>Cost</text:p>
          </table:table-cell>
          <table:table-cell office:value-type="string" table:style-name="ce13">
            <text:p>Note</text:p>
          </table:table-cell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0">
            <text:p><text:a xlink:href="https://store.rokland.com/products/rak-wireless-wisblock-meshtastic-starter-kit">Starter kit (RAK19007), WisBlock</text:a></text:p>
          </table:table-cell>
          <table:table-cell office:value-type="string" table:style-name="ce4">
            <text:p>915MHz</text:p>
          </table:table-cell>
          <table:table-cell office:value-type="string" table:style-name="ce4">
            <text:p>RAKWireless</text:p>
          </table:table-cell>
          <table:table-cell office:value-type="string" table:style-name="ce6">
            <text:p>RAK19007, RAK5631</text:p>
          </table:table-cell>
          <table:table-cell office:value-type="string" table:style-name="ce6">
            <text:p>Rokland</text:p>
          </table:table-cell>
          <table:table-cell office:value-type="float" office:value="116016" table:style-name="ce6">
            <text:p>116016</text:p>
          </table:table-cell>
          <table:table-cell office:value-type="currency" office:value="22.944000000000003" table:formula="of:=28.68*0.8" table:content-validation-name="val1" table:style-name="ce5">
            <office:annotation draw:style-name="a0" svg:x="11.71875in" svg:y="0.197916666666667in" svg:width="4.88541666666667in" svg:height="5.8125in">
              <text:p>Comment:</text:p>
              <text:p><text:s text:c="4"/>Bulk discount</text:p>
            </office:annotation>
            <text:p>$22.94</text:p>
          </table:table-cell>
          <table:table-cell office:value-type="float" office:value="12" table:formula="of:=[.$A$20]" table:style-name="ce2">
            <text:p>12</text:p>
          </table:table-cell>
          <table:table-cell office:value-type="string" table:style-name="ce2">
            <text:p>ea</text:p>
          </table:table-cell>
          <table:table-cell office:value-type="currency" office:value="275.32800000000003" table:formula="of:=[.H2]*[.I2]" table:style-name="ce5">
            <text:p>$275.33</text:p>
          </table:table-cell>
          <table:table-cell office:value-type="string" table:style-name="ce14">
            <text:p>US version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0">
            <text:p><text:a xlink:href="https://store.rokland.com/products/rakwireless-rak5802-rs485-module-3peak-tp8485e-100003?_pos=1&amp;_sid=ff0127ae0&amp;_ss=r">RS485 Module, WisBlock</text:a></text:p>
          </table:table-cell>
          <table:table-cell table:style-name="ce4"/>
          <table:table-cell office:value-type="string" table:style-name="ce4">
            <text:p>RAKWireless</text:p>
          </table:table-cell>
          <table:table-cell office:value-type="string" table:style-name="ce6">
            <text:p>RAK5802</text:p>
          </table:table-cell>
          <table:table-cell office:value-type="string" table:style-name="ce6">
            <text:p>Rokland</text:p>
          </table:table-cell>
          <table:table-cell table:style-name="ce6"/>
          <table:table-cell office:value-type="currency" office:value="6.3760000000000003" table:formula="of:=7.97*0.8" table:content-validation-name="val1" table:style-name="ce5">
            <text:p>$6.38</text:p>
          </table:table-cell>
          <table:table-cell office:value-type="float" office:value="12" table:formula="of:=[.$A$20]" table:style-name="ce2">
            <text:p>12</text:p>
          </table:table-cell>
          <table:table-cell office:value-type="string" table:style-name="ce2">
            <text:p>ea</text:p>
          </table:table-cell>
          <table:table-cell office:value-type="currency" office:value="76.512" table:formula="of:=[.H3]*[.I3]" table:style-name="ce5">
            <text:p>$76.51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<text:a xlink:href="https://www.amazon.com/PATIKIL-Light-Emitting-Indicator-Lighting-Emerald/dp/B0D8GLTZRV?crid=2AZZHIRD2EDVF&amp;dib=eyJ2IjoiMSJ9.oUeb1kjscH2Yax9BV2qx0MN1but3359a7zC-K_IVVG8jDuB5cc1idS4yhh-YaGQ0brozE36CPllssMHkr6IrHbM2e1OBWsKFKfxrHgPqlF-kidT-kSwCRtcpohCTsNAiaimL8qJPM8l_-7N7Y8BObOUESzabJv9IkBRj4lrjzxByhuyTYn-wnJzBABVyuzwzXhxeWDb0yiYIbp_RzMV0IA_EV1q9g2rSOrrXcQGPcMU.loGWB1N3vL1fDttHevrg0-kWTIto-POnO-IW5a1HLCc&amp;dib_tag=se&amp;keywords=3%2Bvolt%2Bdc%2Bled%2Bmini%2Blights%2Bgreen&amp;qid=1751660406&amp;sprefix=3%2Bvolt%2Bdc%2Bled%2Bmini%2Blights%2Bgreen%2Caps%2C130&amp;sr=8-3&amp;th=1">LED, Green, Prewired (12pk)</text:a></text:p>
          </table:table-cell>
          <table:table-cell office:value-type="string" table:style-name="ce4">
            <text:p>5mm, 3V, 20mA</text:p>
          </table:table-cell>
          <table:table-cell office:value-type="string" table:style-name="ce4">
            <text:p>PATIKIL</text:p>
          </table:table-cell>
          <table:table-cell table:style-name="ce6"/>
          <table:table-cell office:value-type="string" table:style-name="ce6">
            <text:p>Amazon</text:p>
          </table:table-cell>
          <table:table-cell office:value-type="string" table:style-name="ce6">
            <text:p>B0D8GLTZRV</text:p>
          </table:table-cell>
          <table:table-cell office:value-type="currency" office:value="0.52416666666666667" table:formula="of:=6.29/12" table:content-validation-name="val1" table:style-name="ce5">
            <text:p>$0.52</text:p>
          </table:table-cell>
          <table:table-cell office:value-type="float" office:value="1" table:formula="of:=COM.MICROSOFT.CEILING([.$A$20]/12;1)" table:style-name="ce2">
            <text:p>1</text:p>
          </table:table-cell>
          <table:table-cell office:value-type="string" table:style-name="ce2">
            <text:p>ea</text:p>
          </table:table-cell>
          <table:table-cell office:value-type="currency" office:value="0.52416666666666667" table:formula="of:=[.H4]*[.I4]" table:style-name="ce5">
            <text:p>$0.52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<text:a xlink:href="https://www.amazon.com/16mmx16mm-Batteries-YQBOOM-Nickeling-Replacement/dp/B09NLTNL64?crid=3CBVQUDODDQZB&amp;dib=eyJ2IjoiMSJ9.TKczZs5jnxx88OWr6BHOcxdEJGO9h3CmU_hS287ct9t65Rw6hW0O2HwxepVmN501x09H5tRij4u2mxIKGs7gxNokK8kWruIDAL98zre4jbRgliE-XKyDMmwPONkkvr2nEGohUelUuhs_z319rtV05AiMNR-smXN4cuP1fIcmOk0xCJlRGOxPm9iK_RCB9xMvJQho8O9jzdc48N-IWYwgtOlzD53x76U-l0kUhCUk-uA.wPRBZ-tC6mvTfYNLmLs2QHa80NoeknhsZhuXgqUYipg&amp;dib_tag=se&amp;keywords=18650+battery+terminal&amp;qid=1751660566&amp;sprefix=18650+battery+terminal%2Caps%2C141&amp;sr=8-3">Battery Spring (20pk)</text:a></text:p>
          </table:table-cell>
          <table:table-cell office:value-type="string" table:style-name="ce4">
            <text:p>16x16mm, 12mm hgt</text:p>
          </table:table-cell>
          <table:table-cell office:value-type="string" table:style-name="ce4">
            <text:p>YQBOOM</text:p>
          </table:table-cell>
          <table:table-cell office:value-type="float" office:value="709520419506" table:style-name="ce6">
            <text:p>7.0952E+11</text:p>
          </table:table-cell>
          <table:table-cell office:value-type="string" table:style-name="ce6">
            <text:p>Amazon</text:p>
          </table:table-cell>
          <table:table-cell office:value-type="string" table:style-name="ce6">
            <text:p>B09NLTNL64</text:p>
          </table:table-cell>
          <table:table-cell office:value-type="currency" office:value="0.29949999999999999" table:formula="of:=5.99/20" table:content-validation-name="val1" table:style-name="ce5">
            <text:p>$0.30</text:p>
          </table:table-cell>
          <table:table-cell office:value-type="float" office:value="1" table:formula="of:=COM.MICROSOFT.CEILING([.$A$20]/20;1)" table:style-name="ce2">
            <text:p>1</text:p>
          </table:table-cell>
          <table:table-cell office:value-type="string" table:style-name="ce2">
            <text:p>ea</text:p>
          </table:table-cell>
          <table:table-cell office:value-type="currency" office:value="0.29949999999999999" table:formula="of:=[.H5]*[.I5]" table:style-name="ce5">
            <text:p>$0.30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3">
            <text:p><text:a xlink:href="https://a.co/d/1YucAoj">JST-PH-2 Pigtails + Sockets (20pk)</text:a></text:p>
          </table:table-cell>
          <table:table-cell office:value-type="string" table:style-name="ce4">
            <text:p>10cm 22AWG M + F</text:p>
          </table:table-cell>
          <table:table-cell office:value-type="string" table:style-name="ce4">
            <text:p>ZSDZFYLLK</text:p>
          </table:table-cell>
          <table:table-cell table:style-name="ce4"/>
          <table:table-cell office:value-type="string" table:style-name="ce4">
            <text:p>Amazon</text:p>
          </table:table-cell>
          <table:table-cell office:value-type="string" table:style-name="ce4">
            <text:p>B0D7Q9HJLQ</text:p>
          </table:table-cell>
          <table:table-cell office:value-type="currency" office:value="6.99" table:content-validation-name="val1" table:style-name="ce5">
            <text:p>$6.99</text:p>
          </table:table-cell>
          <table:table-cell office:value-type="float" office:value="1" table:formula="of:=COM.MICROSOFT.CEILING([.$A$20]/20;1)" table:style-name="ce2">
            <text:p>1</text:p>
          </table:table-cell>
          <table:table-cell office:value-type="string" table:style-name="ce2">
            <text:p>ea</text:p>
          </table:table-cell>
          <table:table-cell office:value-type="currency" office:value="6.99" table:formula="of:=[.H6]*[.I6]" table:style-name="ce5">
            <text:p>$6.99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3">
            <text:p><text:a xlink:href="https://www.amazon.com/Button-Switch-Waterproof-Switches-Motorcycle/dp/B076RL96BM?crid=FWQ1V796OEDW&amp;dib=eyJ2IjoiMSJ9.bSD4CBKeo7m7Sw_frqMgxIfjLbF59qjJczGIdSc_T6zb17Ocw2UOGF9RXhCUXMA8_S9vwULF80vNRAMGhH5uICsVIdYOLPLHang7g-wzJ7RljkelPCUbs2n8WE2-mWV2-UZYZOYFe6RNs3-_mtTpV-sKwqRk2qfeNa-__K-yzDT8-InwMzezG8yCFUKJ7saca-HMjeMK6o6q7449u8v2yzGkeJurescdw0U5lHEYFogOhxZukRb7Zq9YXHTa53MPgPWz3HcoX1Yj19wdQzqZ4TozXxIWTuYktULNxvX6Ro3aB1cALMr-AxGZdqJWYrZQZW5MF5pBy-gGb8ixaBo0f6WAryy88o4-HZlWL5K8DrJriYX9JGoYcI1eXSA4Gaz2PFXXyHFqmy2hubf5KPdWPH4mHgBrdlE2tFgjv_OQy0dgaVv8DiOOmF9YscurFjxy.XrKWKWjjH2K6rnkJUow1WCrhbRU3EZ37wDxu45Wtuzs&amp;dib_tag=se&amp;keywords=waterproof%2Bpushbutton%2Bswitch&amp;qid=1738960730&amp;sprefix=waterproof%2Bpushbutton%2Bswitch%2Caps%2C105&amp;sr=8-5&amp;th=1">Waterproof Push Button Switch (5pk)</text:a></text:p>
          </table:table-cell>
          <table:table-cell office:value-type="string" table:style-name="ce4">
            <text:p>12V, 3A, Red, IP54</text:p>
          </table:table-cell>
          <table:table-cell office:value-type="string" table:style-name="ce4">
            <text:p>Quentacy</text:p>
          </table:table-cell>
          <table:table-cell office:value-type="string" table:style-name="ce4">
            <text:p>LJZ-GAD464-Red</text:p>
          </table:table-cell>
          <table:table-cell office:value-type="string" table:style-name="ce4">
            <text:p>Amazon</text:p>
          </table:table-cell>
          <table:table-cell office:value-type="string" table:style-name="ce4">
            <text:p>B076RL96BM</text:p>
          </table:table-cell>
          <table:table-cell office:value-type="currency" office:value="9.99" table:content-validation-name="val1" table:style-name="ce5">
            <text:p>$9.99</text:p>
          </table:table-cell>
          <table:table-cell office:value-type="float" office:value="3" table:formula="of:=COM.MICROSOFT.CEILING([.$A$20]/5;1)" table:style-name="ce2">
            <text:p>3</text:p>
          </table:table-cell>
          <table:table-cell office:value-type="string" table:style-name="ce2">
            <text:p>ea</text:p>
          </table:table-cell>
          <table:table-cell office:value-type="currency" office:value="29.97" table:formula="of:=[.H7]*[.I7]" table:style-name="ce5">
            <text:p>$29.97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9">
            <text:p><text:a xlink:href="https://www.18650batterystore.com/collections/18650-batteries/products/samsung-25r-18650">18650 Battery</text:a></text:p>
          </table:table-cell>
          <table:table-cell office:value-type="string" table:style-name="ce4">
            <text:p>2500mAh, 20A</text:p>
          </table:table-cell>
          <table:table-cell office:value-type="string" table:style-name="ce4">
            <text:p>Samsung</text:p>
          </table:table-cell>
          <table:table-cell office:value-type="string" table:style-name="ce4">
            <text:p>25R</text:p>
          </table:table-cell>
          <table:table-cell office:value-type="string" table:style-name="ce4">
            <text:p>18650 Battery Store</text:p>
          </table:table-cell>
          <table:table-cell table:style-name="ce4"/>
          <table:table-cell office:value-type="currency" office:value="4.99" table:content-validation-name="val1" table:style-name="ce5">
            <text:p>$4.99</text:p>
          </table:table-cell>
          <table:table-cell office:value-type="float" office:value="12" table:formula="of:=[.$A$20]" table:style-name="ce2">
            <text:p>12</text:p>
          </table:table-cell>
          <table:table-cell office:value-type="string" table:style-name="ce2">
            <text:p>ea</text:p>
          </table:table-cell>
          <table:table-cell office:value-type="currency" office:value="59.88" table:formula="of:=[.H8]*[.I8]" table:style-name="ce5">
            <text:p>$59.88</text:p>
          </table:table-cell>
          <table:table-cell office:value-type="string" table:style-name="ce14">
            <text:p>Any 18650 works</text:p>
          </table:table-cell>
          <table:table-cell table:number-columns-repeated="1637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9">
            <text:p><text:a xlink:href="https://www.amazon.com/915MHz-Antenna-Indoor-Meshtastic-Range/dp/B0FHJNR59W?pd_rd_w=AYYPZ&amp;content-id=amzn1.sym.800434b0-99d2-45b2-ab54-eaca0b27211f&amp;pf_rd_p=800434b0-99d2-45b2-ab54-eaca0b27211f&amp;pf_rd_r=7GS288MQ0JQAPVC6QG6E&amp;pd_rd_wg=m6jdA&amp;pd_rd_r=28302d2f-0c01-4db3-8616-1cc31dbab256&amp;pd_rd_i=B0FHJNR59W&amp;psc=1">Folding Antenna (2pk)</text:a></text:p>
          </table:table-cell>
          <table:table-cell office:value-type="string" table:style-name="ce4">
            <text:p>915MHz SMA</text:p>
          </table:table-cell>
          <table:table-cell office:value-type="string" table:style-name="ce4">
            <text:p>XWWXGG</text:p>
          </table:table-cell>
          <table:table-cell table:style-name="ce6"/>
          <table:table-cell office:value-type="string" table:style-name="ce4">
            <text:p>Amazon</text:p>
          </table:table-cell>
          <table:table-cell office:value-type="string" table:style-name="ce6">
            <text:p>B0FHJNR59W</text:p>
          </table:table-cell>
          <table:table-cell office:value-type="currency" office:value="9.99" table:content-validation-name="val1" table:style-name="ce5">
            <text:p>$9.99</text:p>
          </table:table-cell>
          <table:table-cell office:value-type="float" office:value="6" table:formula="of:=COM.MICROSOFT.CEILING([.$A$20]/2;1)" table:style-name="ce2">
            <text:p>6</text:p>
          </table:table-cell>
          <table:table-cell office:value-type="string" table:style-name="ce2">
            <text:p>ea</text:p>
          </table:table-cell>
          <table:table-cell office:value-type="currency" office:value="59.94" table:formula="of:=[.H9]*[.I9]" table:style-name="ce5">
            <text:p>$59.94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2">
            <text:p><text:a xlink:href="https://www.harborfreight.com/18-inch-low-voltage-multi-colored-test-leads-66717.html">Alligator Test leads (10pk)</text:a></text:p>
          </table:table-cell>
          <table:table-cell office:value-type="string" table:style-name="ce4">
            <text:p>18in, 10pk, 28AWG</text:p>
          </table:table-cell>
          <table:table-cell office:value-type="string" table:style-name="ce4">
            <text:p>CEN-TECH</text:p>
          </table:table-cell>
          <table:table-cell table:style-name="ce4"/>
          <table:table-cell office:value-type="string" table:style-name="ce4">
            <text:p>Harbor Freight</text:p>
          </table:table-cell>
          <table:table-cell office:value-type="float" office:value="66717" table:style-name="ce6">
            <text:p>66717</text:p>
          </table:table-cell>
          <table:table-cell office:value-type="currency" office:value="3.99" table:content-validation-name="val1" table:style-name="ce5">
            <text:p>$3.99</text:p>
          </table:table-cell>
          <table:table-cell office:value-type="float" office:value="3" table:formula="of:=COM.MICROSOFT.CEILING([.$A$20]/4;1)" table:style-name="ce2">
            <text:p>3</text:p>
          </table:table-cell>
          <table:table-cell office:value-type="string" table:style-name="ce2">
            <text:p>ea</text:p>
          </table:table-cell>
          <table:table-cell office:value-type="currency" office:value="11.97" table:formula="of:=[.I10]*[.H10]" table:style-name="ce5">
            <text:p>$11.97</text:p>
          </table:table-cell>
          <table:table-cell office:value-type="string" table:style-name="ce14">
            <text:p>Only Red/Black pairs used</text:p>
          </table:table-cell>
          <table:table-cell table:number-columns-repeated="1637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3">
            <text:p><text:a xlink:href="https://www.amazon.com/Threaded-Inserts-Knurled-Printing-Components/dp/B0D39T7F4H?content-id=amzn1.sym.918a99dd-4826-4c0a-be33-a6705d69c4cf%3Aamzn1.sym.918a99dd-4826-4c0a-be33-a6705d69c4cf&amp;crid=2R1DHKV38AWLS&amp;dib=eyJ2IjoiMSJ9.R-Y1JInOi3IzUslVOqCADjPqZgAH0XRKMoqgeu206vs1PzQGiiC7w817945qiX9R0G6wmIkkSBLdU7pw3TWb8MHi7hbQiec0VAGclPHh8FY.BBrlgAM9AYnbDqRDgw7BhY1h_xGo4MsH3uwEb5KUEZA&amp;dib_tag=se&amp;keywords=hardware+nuts&amp;pd_rd_r=05c60d3f-345d-47b7-9d1a-1010b903eeee&amp;pd_rd_w=ose2C&amp;pd_rd_wg=hiSsl&amp;pid=7AeGIOR&amp;qid=1739634401&amp;refinements=p_n_material_browse%3A17548933011%2Cp_n_feature_fourteen_browse-bin%3A11434050011&amp;s=industrial&amp;sprefix=m2.5%2Bbrass%2Btapered%2Binsert%2Caps%2C108&amp;sr=1-1">M2.5 Brass Threaded Heat Set Inserts (100pk)</text:a></text:p>
          </table:table-cell>
          <table:table-cell office:value-type="string" table:style-name="ce4">
            <text:p>M2.5-0.45, L4, OD3.5</text:p>
          </table:table-cell>
          <table:table-cell office:value-type="string" table:style-name="ce4">
            <text:p>Kvohlum</text:p>
          </table:table-cell>
          <table:table-cell office:value-type="string" table:style-name="ce4">
            <text:p>M2.5x4Lx3.5mm</text:p>
          </table:table-cell>
          <table:table-cell office:value-type="string" table:style-name="ce4">
            <text:p>Amazon</text:p>
          </table:table-cell>
          <table:table-cell office:value-type="string" table:style-name="ce4">
            <text:p>B0D39T7F4H</text:p>
          </table:table-cell>
          <table:table-cell office:value-type="currency" office:value="7.99" table:content-validation-name="val1" table:style-name="ce5">
            <text:p>$7.99</text:p>
          </table:table-cell>
          <table:table-cell office:value-type="float" office:value="1" table:formula="of:=COM.MICROSOFT.CEILING([.$A$20]*4/100;1)" table:style-name="ce2">
            <text:p>1</text:p>
          </table:table-cell>
          <table:table-cell office:value-type="string" table:style-name="ce2">
            <text:p>ea</text:p>
          </table:table-cell>
          <table:table-cell office:value-type="currency" office:value="7.99" table:formula="of:=[Hybrid_V2_BOM.$H11]*[Hybrid_V2_BOM.$I11]" table:style-name="ce5">
            <text:p>$7.99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3">
            <text:p><text:a xlink:href="https://www.amazon.com/Socket-Screws-100-piece-Stainless-Thread/dp/B01H210BLW?dib=eyJ2IjoiMSJ9.2y7IFFYpMJbA5FUgpbSgAE-1PmWK9CKPNwwtxoewqJ32tg3TAPKGbNr18pLKgMmLZG9hr9JSrsMdLULDSdkqI9M56xdd003bFog24TUjqZJqTHiwRHB4nPW8k9ZrhpZMTBOjdANeMLBCBBQMQfco44lrb9p0bto4v83X4sd3-CHGYQQePk8fh7RDeGDtm3VSdrDTl8MXliZ2kyMcCVv4V_8t6rbALg0KdN1Xyi-KwXtoFTDDq9exUcx_rxSySFDwK02Xs1-bMRPjxX859dGVX1bEdvaY1KC9GP3V0citYAjhRbE6G3M18R3PIbJ9p2kCox5kNeKSYNRCsM0DP8iIA2HCHC5tPXLUeA3RItejT7A.9GdTum75EG6jKhFydNYrzhTvZQJ6Gj66MEEllYHuY64&amp;dib_tag=se&amp;keywords=m2.5%2B8mm%2Bsocket%2Bhead%2Bscrew&amp;qid=1739637704&amp;s=industrial&amp;sr=1-16&amp;th=1">M2.5 8mm Stainless Steel Socket Head Screw (100pk)</text:a></text:p>
          </table:table-cell>
          <table:table-cell office:value-type="string" table:style-name="ce4">
            <text:p>M2.5-0.45, L=8mm, hex</text:p>
          </table:table-cell>
          <table:table-cell office:value-type="string" table:style-name="ce4">
            <text:p>HH Fasteners</text:p>
          </table:table-cell>
          <table:table-cell office:value-type="string" table:style-name="ce4">
            <text:p>M2.5x8mm</text:p>
          </table:table-cell>
          <table:table-cell office:value-type="string" table:style-name="ce4">
            <text:p>Amazon</text:p>
          </table:table-cell>
          <table:table-cell office:value-type="string" table:style-name="ce4">
            <text:p>B01H210BLW</text:p>
          </table:table-cell>
          <table:table-cell office:value-type="currency" office:value="7.59" table:content-validation-name="val1" table:style-name="ce5">
            <text:p>$7.59</text:p>
          </table:table-cell>
          <table:table-cell office:value-type="float" office:value="1" table:formula="of:=COM.MICROSOFT.CEILING([.$A$20]*4/100;1)" table:style-name="ce2">
            <text:p>1</text:p>
          </table:table-cell>
          <table:table-cell office:value-type="string" table:style-name="ce2">
            <text:p>ea</text:p>
          </table:table-cell>
          <table:table-cell office:value-type="currency" office:value="7.59" table:formula="of:=[Hybrid_V2_BOM.$H12]*[Hybrid_V2_BOM.$I12]" table:style-name="ce5">
            <text:p>$7.59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2">
            <text:p><text:a xlink:href="https://www.amazon.com/Machine-Sutemribor-Phillips-Stainless-Threaded/dp/B0DJKWR1V9?crid=3U445RX6CMM27&amp;dib=eyJ2IjoiMSJ9.lATz2nQy40z4ek1NsPr2GsopauKS8j4Cj3-JV3fUfwY7Samw3Oax00l5wx7NFWeZwfFLcTAFA1AydxRaX0CBSGTzs-AYnbe87EU3MW3ZeIIByI4_Q4h-YTmR00ucjUnCGm3w_Ed_vcbDx5eM_PeuaaiGCjkb86Kxn90J25UEjgSGsggH37UWR1A1IX3x5za6-8j8PczweKeKISSXKeCTKdN9nhRM-Se-RNkMiGkx2jY.r_2ueHiPnOoOSHAQpRBhRmfIrwEbxz6rO_MS5p-IBso&amp;dib_tag=se&amp;keywords=m2.5%2B4mm%2Bphillips%2Bhead%2Bscrew&amp;qid=1769092026&amp;refinements=p_36%3A-900&amp;rnid=2661611011&amp;sprefix=m2.5%2B4mm%2Bphillips%2Bhead%2Bscrew%2Caps%2C111&amp;sr=8-2&amp;th=1">M2.5 4mm Pan Head Screw (105pk)</text:a></text:p>
          </table:table-cell>
          <table:table-cell office:value-type="string" table:style-name="ce4">
            <text:p>M2.5-0.45, L=4mm, phillips</text:p>
          </table:table-cell>
          <table:table-cell office:value-type="string" table:style-name="ce4">
            <text:p>Sutemribor</text:p>
          </table:table-cell>
          <table:table-cell office:value-type="string" table:style-name="ce4">
            <text:p>M2.5x4mm</text:p>
          </table:table-cell>
          <table:table-cell office:value-type="string" table:style-name="ce4">
            <text:p>Amazon</text:p>
          </table:table-cell>
          <table:table-cell office:value-type="string" table:style-name="ce4">
            <text:p>B0DJKWR1V9</text:p>
          </table:table-cell>
          <table:table-cell office:value-type="currency" office:value="6.99" table:content-validation-name="val1" table:style-name="ce5">
            <text:p>$6.99</text:p>
          </table:table-cell>
          <table:table-cell office:value-type="float" office:value="1" table:formula="of:=COM.MICROSOFT.CEILING([.$A$20]*4/105;1)" table:style-name="ce2">
            <text:p>1</text:p>
          </table:table-cell>
          <table:table-cell office:value-type="string" table:style-name="ce2">
            <text:p>ea</text:p>
          </table:table-cell>
          <table:table-cell office:value-type="currency" office:value="6.99" table:formula="of:=[Hybrid_V2_BOM.$H13]*[Hybrid_V2_BOM.$I13]" table:style-name="ce5">
            <text:p>$6.99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9">
            <text:p><text:a xlink:href="https://www.microcenter.com/product/626527/inland-175mm-petg-3d-printer-filament-1kg-(22-lbs)-spool-orange">3D Printer material - PETG</text:a></text:p>
          </table:table-cell>
          <table:table-cell office:value-type="string" table:style-name="ce4">
            <text:p>PETG+</text:p>
          </table:table-cell>
          <table:table-cell office:value-type="string" table:style-name="ce4">
            <text:p>Inland</text:p>
          </table:table-cell>
          <table:table-cell office:value-type="string" table:style-name="ce4">
            <text:p>PETG+175SO1</text:p>
          </table:table-cell>
          <table:table-cell office:value-type="string" table:style-name="ce4">
            <text:p>MicroCenter</text:p>
          </table:table-cell>
          <table:table-cell office:value-type="float" office:value="151498" table:style-name="ce6">
            <text:p>151498</text:p>
          </table:table-cell>
          <table:table-cell office:value-type="currency" office:value="1.5990000000000001E-2" table:formula="of:=[.$A$23]/1000" table:content-validation-name="val1" table:style-name="ce5">
            <text:p>$0.02</text:p>
          </table:table-cell>
          <table:table-cell office:value-type="float" office:value="780" table:formula="of:=(44+21)*[.$A$20]" table:style-name="ce2">
            <text:p>780</text:p>
          </table:table-cell>
          <table:table-cell office:value-type="string" table:style-name="ce2">
            <text:p>g</text:p>
          </table:table-cell>
          <table:table-cell office:value-type="currency" office:value="12.472200000000001" table:formula="of:=[.H14]*[.I14]" table:style-name="ce5">
            <text:p>$12.47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9">
            <text:p><text:a xlink:href="https://www.microcenter.com/product/611556/inland-175mm-pla-3d-printer-filament-10-kg-(22-lbs)-spool-bone-white">3D Printer material - PLA</text:a></text:p>
          </table:table-cell>
          <table:table-cell office:value-type="string" table:style-name="ce4">
            <text:p>PLA+</text:p>
          </table:table-cell>
          <table:table-cell office:value-type="string" table:style-name="ce4">
            <text:p>Inland</text:p>
          </table:table-cell>
          <table:table-cell office:value-type="string" table:style-name="ce4">
            <text:p>PLA 175BW1</text:p>
          </table:table-cell>
          <table:table-cell office:value-type="string" table:style-name="ce4">
            <text:p>MicroCenter</text:p>
          </table:table-cell>
          <table:table-cell office:value-type="float" office:value="989038" table:style-name="ce6">
            <text:p>989038</text:p>
          </table:table-cell>
          <table:table-cell office:value-type="currency" office:value="1.499E-2" table:formula="of:=[.$A$24]/1000" table:content-validation-name="val1" table:style-name="ce5">
            <text:p>$0.01</text:p>
          </table:table-cell>
          <table:table-cell office:value-type="float" office:value="48" table:formula="of:=4*[.$A$20]" table:style-name="ce2">
            <text:p>48</text:p>
          </table:table-cell>
          <table:table-cell office:value-type="string" table:style-name="ce2">
            <text:p>g</text:p>
          </table:table-cell>
          <table:table-cell office:value-type="currency" office:value="8.6342399999999984" table:formula="of:=[.H15]*[.I15]*[.$A$20]" table:style-name="ce5">
            <text:p>$8.63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9">
            <text:p><text:a xlink:href="https://us.store.bambulab.com/products/support-for-pla-petg">3D Printer material - PLA Support</text:a></text:p>
          </table:table-cell>
          <table:table-cell office:value-type="string" table:style-name="ce4">
            <text:p>Support for PLA</text:p>
          </table:table-cell>
          <table:table-cell office:value-type="string" table:style-name="ce4">
            <text:p>Bambu</text:p>
          </table:table-cell>
          <table:table-cell table:style-name="ce4"/>
          <table:table-cell office:value-type="string" table:style-name="ce4">
            <text:p>Bambu</text:p>
          </table:table-cell>
          <table:table-cell table:style-name="ce6"/>
          <table:table-cell office:value-type="currency" office:value="2.7989999999999998E-2" table:formula="of:=[.$A$25]/1000" table:content-validation-name="val1" table:style-name="ce5">
            <text:p>$0.0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</text:p>
          </table:table-cell>
          <table:table-cell office:value-type="currency" office:value="0" table:formula="of:=[.I16]*[.H16]*[.$A$20]" table:style-name="ce5">
            <text:p>$0.00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9">
            <text:p><text:a xlink:href="https://www.harborfreight.com/2800-weatherproof-protective-case-medium-orange-58655.html">Protective Carrying Case, Weatherproof<text:s/></text:a></text:p>
          </table:table-cell>
          <table:table-cell office:value-type="string" table:style-name="ce4">
            <text:p>9.3L, 6x12in outside</text:p>
          </table:table-cell>
          <table:table-cell office:value-type="string" table:style-name="ce4">
            <text:p>Apache</text:p>
          </table:table-cell>
          <table:table-cell office:value-type="float" office:value="2800" table:style-name="ce6">
            <text:p>2800</text:p>
          </table:table-cell>
          <table:table-cell office:value-type="string" table:style-name="ce4">
            <text:p>Harbor Freight</text:p>
          </table:table-cell>
          <table:table-cell office:value-type="float" office:value="58655" table:style-name="ce6">
            <text:p>58655</text:p>
          </table:table-cell>
          <table:table-cell office:value-type="currency" office:value="29.99" table:content-validation-name="val1" table:style-name="ce5">
            <text:p>$29.99</text:p>
          </table:table-cell>
          <table:table-cell office:value-type="float" office:value="1" table:formula="of:=COM.MICROSOFT.CEILING([.$A$20]/12;1)" table:style-name="ce2">
            <text:p>1</text:p>
          </table:table-cell>
          <table:table-cell office:value-type="string" table:style-name="ce2">
            <text:p>ea</text:p>
          </table:table-cell>
          <table:table-cell office:value-type="currency" office:value="29.99" table:formula="of:=[.H17]*[.I17]" table:style-name="ce5">
            <text:p>$29.99</text:p>
          </table:table-cell>
          <table:table-cell office:value-type="string" table:style-name="ce14">
            <text:p>Optional</text:p>
          </table:table-cell>
          <table:table-cell table:number-columns-repeated="16372"/>
        </table:table-row>
        <table:table-row table:style-name="ro2">
          <table:table-cell table:number-columns-repeated="10" table:style-name="ce1"/>
          <table:table-cell office:value-type="currency" office:value="47.090842222222228" table:formula="of:=SUM([.K2:.K16])/[.$A$20]" table:style-name="ce15">
            <text:p>$47.09</text:p>
          </table:table-cell>
          <table:table-cell office:value-type="string" table:style-name="ce7">
            <text:p>Cost per node</text:p>
          </table:table-cell>
          <table:table-cell table:number-columns-repeated="16372"/>
        </table:table-row>
        <table:table-row table:style-name="ro2">
          <table:table-cell table:number-columns-repeated="10" table:style-name="ce1"/>
          <table:table-cell office:value-type="currency" office:value="595.08010666666678" table:formula="of:=SUM([Hybrid_V2_BOM.$K$2:.$K$17])" table:style-name="ce15">
            <text:p>$595.08</text:p>
          </table:table-cell>
          <table:table-cell office:value-type="string" table:style-name="ce7">
            <text:p>Cost per kit</text:p>
          </table:table-cell>
          <table:table-cell table:number-columns-repeated="16372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7">
            <text:p># nodes</text:p>
          </table:table-cell>
          <table:table-cell table:number-columns-repeated="16382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currency" office:value="15.99" table:style-name="ce8">
            <text:p>$15.99</text:p>
          </table:table-cell>
          <table:table-cell office:value-type="string" table:style-name="ce7">
            <text:p>Inland PETG+ cost per kg</text:p>
          </table:table-cell>
          <table:table-cell office:value-type="string" table:style-name="ce7">
            <text:p>Regularly $22.99</text:p>
          </table:table-cell>
          <table:table-cell table:number-columns-repeated="16381" table:style-name="ce1"/>
        </table:table-row>
        <table:table-row table:style-name="ro3">
          <table:table-cell office:value-type="currency" office:value="14.99" table:style-name="ce8">
            <text:p>$14.99</text:p>
          </table:table-cell>
          <table:table-cell office:value-type="string" table:style-name="ce7">
            <text:p>Inland PLA+ cost per kg</text:p>
          </table:table-cell>
          <table:table-cell table:number-columns-repeated="16382" table:style-name="ce1"/>
        </table:table-row>
        <table:table-row table:style-name="ro3">
          <table:table-cell office:value-type="currency" office:value="27.99" table:style-name="ce8">
            <text:p>$27.99</text:p>
          </table:table-cell>
          <table:table-cell office:value-type="string" table:style-name="ce7">
            <text:p>Bambu Support for PLA cost per kg</text:p>
          </table:table-cell>
          <table:table-cell table:number-columns-repeated="16382" table:style-name="ce1"/>
        </table:table-row>
        <table:table-row table:number-rows-repeated="1048551" table:style-name="ro2">
          <table:table-cell table:number-columns-repeated="16384"/>
        </table:table-row>
      </table:table>
      <table:database-ranges>
        <table:database-range table:target-range-address="Hybrid_V2_BOM.A1:Hybrid_V2_BOM.L17" table:name="BOM_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Roboto" svg:font-family="Roboto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decimal-places="2" number:min-integer-digits="1" number:grouping="true"/>
    </number:currency-style>
    <style:style style:name="Hyperlink" style:family="table-cell" style:data-style-name="N0">
      <style:text-properties fo:color="#1155CC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>Bill of Materials, FLAMINGO Hybrid V2 US Version</dc:title>
    <meta:initial-creator>Jamie</meta:initial-creator>
    <dc:creator>Jamie Moon</dc:creator>
    <meta:creation-date>2026-02-21T20:55:36Z</meta:creation-date>
    <dc:date>2026-02-21T20:55:36Z</dc:date>
  </office:meta>
</office:document-meta>
</file>